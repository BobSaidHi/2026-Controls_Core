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Dot" draw:fill="hatch" draw:fill-hatch-name="Black_20_0_20_Degrees" loext:fill-use-slide-background="false" draw:opacity="0%" draw:textarea-horizontal-align="justify" draw:textarea-vertical-align="middle" draw:auto-grow-height="false" fo:min-height="10.436cm" fo:min-width="8cm" loext:decorative="false"/>
    </style:style>
    <style:style style:name="gr2" style:family="graphic" style:parent-style-name="objectwithoutfill">
      <style:graphic-properties svg:stroke-width="0.051cm" svg:stroke-color="#789f90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71cm" svg:stroke-color="#789f90" draw:marker-start-width="0.306cm" draw:marker-end="" draw:marker-end-width="0.406cm" draw:fill="none" draw:textarea-vertical-align="middle" fo:padding-top="0.16cm" fo:padding-bottom="0.16cm" fo:padding-left="0.285cm" fo:padding-right="0.28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63cm" fo:min-width="9.38cm" loext:decorative="false"/>
    </style:style>
    <style:style style:name="gr5" style:family="graphic" style:parent-style-name="objectwithoutfill">
      <style:graphic-properties svg:stroke-width="0.071cm" svg:stroke-color="#154734" draw:marker-start-width="0.306cm" draw:marker-end="Arrowheads_20_31" draw:marker-end-width="0.406cm" draw:fill="none" draw:textarea-vertical-align="middle" fo:padding-top="0.16cm" fo:padding-bottom="0.16cm" fo:padding-left="0.285cm" fo:padding-right="0.285cm" loext:decorative="false"/>
    </style:style>
    <style:style style:name="gr6" style:family="graphic" style:parent-style-name="standard" style:list-style-name="L1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7" style:family="graphic" style:parent-style-name="objectwithoutfill">
      <style:graphic-properties svg:stroke-width="0.071cm" svg:stroke-color="#154734" draw:marker-start-width="0.309cm" draw:marker-end="Arrowheads_20_13" draw:marker-end-width="0.411cm" draw:fill="none" draw:textarea-vertical-align="middle" fo:padding-top="0.16cm" fo:padding-bottom="0.16cm" fo:padding-left="0.285cm" fo:padding-right="0.285cm" loext:decorative="false"/>
    </style:style>
    <style:style style:name="gr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9" style:family="graphic" style:parent-style-name="standard">
      <style:graphic-properties draw:fill="solid" draw:fill-color="#bd8b13" draw:textarea-horizontal-align="justify" draw:textarea-vertical-align="middle" draw:auto-grow-height="false" fo:min-height="1.796cm" fo:min-width="1.796cm" fo:padding-top="0cm" fo:padding-bottom="0cm" fo:padding-left="0cm" fo:padding-right="0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stroke-dash="Dot" draw:fill="none" draw:fill-color="#bd8b13" loext:fill-use-slide-background="false" draw:textarea-horizontal-align="justify" draw:textarea-vertical-align="middle" draw:auto-grow-height="false" fo:min-height="2.245cm" fo:min-width="2.245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bd8b13" draw:textarea-horizontal-align="justify" draw:textarea-vertical-align="middle" draw:auto-grow-height="false" fo:min-height="1.546cm" fo:min-width="1.296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71cm" svg:stroke-color="#154734" draw:marker-start-width="0.309cm" draw:marker-end="Arrowheads_20_10" draw:marker-end-width="0.411cm" draw:fill="none" draw:textarea-vertical-align="middle" fo:padding-top="0.16cm" fo:padding-bottom="0.16cm" fo:padding-left="0.285cm" fo:padding-right="0.285cm" loext:decorative="false"/>
    </style:style>
    <style:style style:name="gr13" style:family="graphic" style:parent-style-name="objectwithoutfill">
      <style:graphic-properties svg:stroke-width="0.051cm" svg:stroke-color="#154734" draw:marker-start-width="0.279cm" draw:marker-end="Arrowheads_20_12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789f90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71cm" svg:stroke-color="#54585a" draw:marker-start-width="0.309cm" draw:marker-end="Arrowheads_20_26" draw:marker-end-width="0.411cm" draw:fill="none" draw:textarea-vertical-align="middle" fo:padding-top="0.16cm" fo:padding-bottom="0.16cm" fo:padding-left="0.285cm" fo:padding-right="0.28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92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fo:min-height="1.255cm" loext:decorative="false"/>
      <style:paragraph-properties style:writing-mode="lr-tb"/>
    </style:style>
    <style:style style:name="gr19" style:family="graphic" style:parent-style-name="objectwithoutfill">
      <style:graphic-properties svg:stroke-width="0.071cm" svg:stroke-color="#54585a" draw:marker-start-width="0.309cm" draw:marker-end="Arrowheads_20_22" draw:marker-end-width="0.411cm" draw:fill="none" draw:textarea-vertical-align="middle" fo:padding-top="0.16cm" fo:padding-bottom="0.16cm" fo:padding-left="0.285cm" fo:padding-right="0.285cm" loext:decorative="false"/>
    </style:style>
    <style:style style:name="gr20" style:family="graphic" style:parent-style-name="objectwithoutfill">
      <style:graphic-properties svg:stroke-width="0.071cm" svg:stroke-color="#54585a" draw:marker-start-width="0.306cm" draw:marker-end="Arrowheads_20_30" draw:marker-end-width="0.406cm" draw:fill="none" draw:textarea-vertical-align="middle" fo:padding-top="0.16cm" fo:padding-bottom="0.16cm" fo:padding-left="0.285cm" fo:padding-right="0.285cm" loext:decorative="false"/>
    </style:style>
    <style:style style:name="gr21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255cm" draw:shadow-opacity="75%" loext:decorative="false"/>
      <style:paragraph-properties style:writing-mode="lr-tb"/>
    </style:style>
    <style:style style:name="gr22" style:family="graphic" style:parent-style-name="objectwithoutfill">
      <style:graphic-properties svg:stroke-width="0.071cm" svg:stroke-color="#154734" draw:marker-start-width="0.306cm" draw:marker-end="Arrowheads_20_34" draw:marker-end-width="0.406cm" draw:fill="none" draw:textarea-vertical-align="middle" fo:padding-top="0.16cm" fo:padding-bottom="0.16cm" fo:padding-left="0.285cm" fo:padding-right="0.28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3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fo:min-height="0.628cm" loext:decorative="false"/>
      <style:paragraph-properties style:writing-mode="lr-tb"/>
    </style:style>
    <style:style style:name="gr25" style:family="graphic" style:parent-style-name="objectwithoutfill">
      <style:graphic-properties svg:stroke-width="0.071cm" svg:stroke-color="#54585a" draw:marker-start-width="0.309cm" draw:marker-end="Arrowheads_20_3" draw:marker-end-width="0.411cm" draw:fill="none" draw:textarea-vertical-align="middle" fo:padding-top="0.16cm" fo:padding-bottom="0.16cm" fo:padding-left="0.285cm" fo:padding-right="0.285cm" loext:decorative="false"/>
    </style:style>
    <style:style style:name="gr26" style:family="graphic" style:parent-style-name="objectwithoutfill">
      <style:graphic-properties svg:stroke-width="0.071cm" svg:stroke-color="#54585a" draw:marker-start-width="0.309cm" draw:marker-end="Arrowheads_20_23" draw:marker-end-width="0.411cm" draw:fill="none" draw:textarea-vertical-align="middl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11cm" draw:shadow-opacity="75%" loext:decorative="false"/>
      <style:paragraph-properties style:writing-mode="lr-tb"/>
    </style:style>
    <style:style style:name="gr28" style:family="graphic" style:parent-style-name="objectwithoutfill">
      <style:graphic-properties svg:stroke-width="0.071cm" svg:stroke-color="#154734" draw:marker-start-width="0.306cm" draw:marker-end="Arrowheads_20_32" draw:marker-end-width="0.406cm" draw:fill="none" draw:textarea-vertical-align="middl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svg:stroke-color="#000000" draw:fill="solid" draw:fill-color="#ffffff" draw:opacity="75%" draw:textarea-horizontal-align="center" draw:auto-grow-height="true" draw:auto-grow-width="false" fo:min-height="2.509cm" draw:shadow-opacity="75%" loext:decorative="false"/>
      <style:paragraph-properties style:writing-mode="lr-tb"/>
    </style:style>
    <style:style style:name="P1" style:family="paragraph">
      <loext:graphic-properties draw:fill="hatch" draw:fill-hatch-name="Black_20_0_20_Degrees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75%"/>
      <style:paragraph-properties fo:margin-left="0cm" fo:margin-right="0cm" fo:margin-top="0cm" fo:margin-bottom="0cm" fo:line-height="100%" fo:text-align="center" fo:text-indent="0cm"/>
      <style:text-properties style:font-name="Times New Roman1" fo:font-size="16pt" style:font-size-asian="16pt" style:font-size-complex="16pt" style:text-overline-style="solid" style:text-overline-width="auto" style:text-overline-color="font-color"/>
    </style:style>
    <style:style style:name="P6" style:family="paragraph">
      <loext:graphic-properties draw:fill="solid" draw:fill-color="#ffffff" draw:opacity="75%"/>
      <style:paragraph-properties fo:text-align="center"/>
      <style:text-properties style:font-name="Times New Roman1" fo:font-size="16pt" style:font-size-asian="16pt" style:font-size-complex="16pt" style:text-overline-style="solid" style:text-overline-width="auto" style:text-overline-color="font-color"/>
    </style:style>
    <style:style style:name="P7" style:family="paragraph">
      <style:paragraph-properties fo:text-align="center"/>
      <style:text-properties style:font-name="Times New Roman" fo:font-size="18pt" fo:font-weight="bold" style:font-size-asian="18pt" style:font-size-complex="18pt"/>
    </style:style>
    <style:style style:name="P8" style:family="paragraph">
      <loext:graphic-properties draw:fill="solid" draw:fill-color="#bd8b13"/>
      <style:paragraph-properties fo:text-align="center" style:writing-mode="lr-tb"/>
      <style:text-properties style:font-name="Times New Roman" fo:font-size="18pt" fo:font-weight="bold" style:font-size-asian="18pt" style:font-size-complex="18pt"/>
    </style:style>
    <style:style style:name="P9" style:family="paragraph">
      <style:paragraph-properties fo:text-align="center"/>
      <style:text-properties style:font-name="Times New Roman" fo:font-size="16pt" fo:font-weight="bold" style:font-size-asian="16pt" style:font-size-complex="16pt"/>
    </style:style>
    <style:style style:name="P10" style:family="paragraph">
      <loext:graphic-properties draw:fill="none" draw:fill-color="#bd8b13"/>
      <style:paragraph-properties fo:text-align="center" style:writing-mode="lr-tb"/>
      <style:text-properties style:font-name="Times New Roman" fo:font-size="16pt" fo:font-weight="bold" style:font-size-asian="16pt" style:font-size-complex="16pt"/>
    </style:style>
    <style:style style:name="P11" style:family="paragraph">
      <loext:graphic-properties draw:fill="solid" draw:fill-color="#bd8b13"/>
      <style:paragraph-properties fo:text-align="center" style:writing-mode="lr-tb"/>
      <style:text-properties style:font-name="Times New Roman" fo:font-size="16pt" fo:font-weight="bold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P13" style:family="paragraph">
      <style:paragraph-properties fo:text-align="center" loext:tab-stop-distance="0cm">
        <style:tab-stops/>
      </style:paragraph-properties>
    </style:style>
    <style:style style:name="P1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1" fo:font-size="18pt" fo:font-weight="bold" style:font-weight-asian="bold" style:font-weight-complex="bold" style:text-overline-style="none" style:text-overline-color="font-color"/>
    </style:style>
    <style:style style:name="P1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T2" style:family="text">
      <style:text-properties style:font-name="Times New Roman1" fo:font-size="16pt" style:font-size-asian="16pt" style:font-size-complex="16pt" style:text-overline-style="solid" style:text-overline-width="bold" style:text-overline-color="font-color"/>
    </style:style>
    <style:style style:name="T3" style:family="text">
      <style:text-properties style:font-name="Times New Roman1" fo:font-size="16pt" style:font-size-asian="16pt" style:font-size-complex="16pt" style:text-overline-style="none" style:text-overline-color="font-color"/>
    </style:style>
    <style:style style:name="T4" style:family="text">
      <style:text-properties style:font-name="Times New Roman" fo:font-size="18pt" fo:font-weight="bold" style:font-size-asian="18pt" style:font-size-complex="18pt"/>
    </style:style>
    <style:style style:name="T5" style:family="text">
      <style:text-properties style:font-name="Times New Roman" fo:font-size="16pt" fo:font-weight="bold" style:font-size-asian="16pt" style:font-size-complex="16pt"/>
    </style:style>
    <style:style style:name="T6" style:family="text">
      <style:text-properties fo:color="#ffffff" loext:opacity="100%" style:font-name="Times New Roman1" fo:font-size="18pt" fo:font-weight="bold" style:font-weight-asian="bold" style:font-weight-complex="bold" style:text-overline-style="none" style:text-overline-color="font-color"/>
    </style:style>
    <style:style style:name="T7" style:family="text">
      <style:text-properties style:font-name="Times New Roman1" fo:font-size="16pt" style:font-size-asian="16pt" style:font-size-complex="16pt" style:text-overline-style="solid" style:text-overline-width="auto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3.869cm" svg:y1="7.883cm" svg:x2="2.485cm" svg:y2="7.883cm" draw:start-shape="id1" draw:start-glue-point="7" draw:end-shape="id2" draw:end-glue-point="9" svg:d="M13869 7883h-11384" svg:viewBox="0 0 11385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draw:line-skew="-1.018cm" svg:x1="14.767cm" svg:y1="8.255cm" svg:x2="12.645cm" svg:y2="12.483cm" draw:start-shape="id1" draw:start-glue-point="8" draw:end-shape="id3" draw:end-glue-point="11" svg:d="M14767 8255c0 1366-2122-747-2122 4228" svg:viewBox="0 0 2123 4229">
          <text:p/>
        </draw:connector>
        <draw:frame draw:style-name="gr6" draw:text-style-name="P5" draw:layer="layout" svg:width="4.128cm" svg:height="2.759cm" svg:x="11.43cm" svg:y="8.572cm">
          <draw:text-box>
            <text:p text:style-name="P3"><text:span text:style-name="T1">Power &lt;= 28 W</text:span></text:p>
            <text:p text:style-name="P4"><text:span text:style-name="T2"><text:s text:c="2"/>Pitch → Halt <text:s/></text:span></text:p>
            <text:p text:style-name="P4"><text:span text:style-name="T3">Load → Slow </text:span></text:p>
          </draw:text-box>
        </draw:frame>
        <draw:connector draw:style-name="gr7" draw:text-style-name="P2" draw:layer="layout" draw:type="curve" svg:x1="13.017cm" svg:y1="13.381cm" svg:x2="15.665cm" svg:y2="7.883cm" draw:start-shape="id3" draw:start-glue-point="10" draw:end-shape="id1" draw:end-glue-point="9" svg:d="M13017 13381c1766 0 2648-1832 2648-5498" svg:viewBox="0 0 2649 5499">
          <text:p/>
        </draw:connector>
        <draw:frame draw:style-name="gr8" draw:text-style-name="P6" draw:layer="layout" svg:width="3.826cm" svg:height="2.759cm" svg:x="12.684cm" svg:y="11.956cm">
          <draw:text-box>
            <text:p text:style-name="P4"><text:span text:style-name="T1">Power &gt; 28 W</text:span></text:p>
            <text:p text:style-name="P4"><text:span text:style-name="T2"><text:s text:c="2"/>Pitch → PI <text:s/></text:span></text:p>
            <text:p text:style-name="P3"><text:span text:style-name="T3">Load → Halt</text:span></text:p>
          </draw:text-box>
        </draw:frame>
        <draw:custom-shape draw:style-name="gr9" draw:text-style-name="P8" xml:id="id3" draw:id="id3" draw:layer="layout" svg:width="2.54cm" svg:height="2.54cm" svg:x="10.477cm" svg:y="12.111cm">
          <text:p text:style-name="P7"><text:span text:style-name="T4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.175cm" svg:height="3.175cm" svg:x="0cm" svg:y="-0.317cm">
          <text:p text:style-name="P9"><text:span text:style-name="T5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5" draw:id="id5" draw:layer="layout" svg:width="2.54cm" svg:height="2.54cm" svg:x="7.146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2.54cm" svg:height="2.54cm" svg:x="13.4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0.689cm" svg:y1="7.883cm" svg:x2="2.695cm" svg:y2="13.381cm" draw:start-shape="id2" draw:start-glue-point="7" draw:end-shape="id4" draw:end-glue-point="6" svg:d="M689 7883c0 3666 668 5498 2006 5498" svg:viewBox="0 0 2007 5499">
          <text:p/>
        </draw:connector>
        <draw:connector draw:style-name="gr13" draw:text-style-name="P2" draw:layer="layout" draw:type="curve" svg:x1="5.235cm" svg:y1="13.381cm" svg:x2="10.477cm" svg:y2="13.381cm" draw:end-shape="id3" svg:d="M5235 13381h5242" svg:viewBox="0 0 5243 1">
          <text:p/>
        </draw:connector>
        <draw:connector draw:style-name="gr14" draw:text-style-name="P2" draw:layer="layout" draw:type="curve" draw:line-skew="-1.705cm" svg:x1="11.747cm" svg:y1="12.111cm" svg:x2="2.485cm" svg:y2="7.883cm" draw:start-shape="id3" draw:start-glue-point="4" draw:end-shape="id2" draw:end-glue-point="9" svg:d="M11747 12111c0-5448-9262-3334-9262-4228" svg:viewBox="0 0 9263 4229">
          <text:p/>
        </draw:connector>
        <draw:connector draw:style-name="gr15" draw:text-style-name="P2" draw:layer="layout" draw:type="curve" draw:line-skew="1.447cm" svg:x1="13.869cm" svg:y1="6.087cm" svg:x2="8.416cm" svg:y2="2.54cm" draw:start-shape="id1" draw:start-glue-point="5" draw:end-shape="id5" draw:end-glue-point="8" svg:d="M13869 6087c0-768-5453 1005-5453-3547" svg:viewBox="0 0 5454 3548">
          <text:p/>
        </draw:connector>
        <draw:frame draw:style-name="gr16" draw:text-style-name="P12" draw:layer="layout" svg:width="4.128cm" svg:height="0.878cm" svg:x="2.857cm" svg:y="0.392cm">
          <draw:text-box>
            <text:p text:style-name="P4"><text:span text:style-name="T1">safetyTask</text:span></text:p>
          </draw:text-box>
        </draw:frame>
        <draw:frame draw:style-name="gr17" draw:text-style-name="P14" draw:layer="layout" svg:width="3.175cm" svg:height="3.175cm" svg:x="6.829cm" svg:y="-0.317cm">
          <draw:text-box>
            <text:p text:style-name="P13"><text:span text:style-name="T6">ESTOP</text:span></text:p>
          </draw:text-box>
        </draw:frame>
        <draw:frame draw:style-name="gr18" draw:text-style-name="P15" draw:layer="layout" svg:width="4.762cm" svg:height="1.505cm" svg:x="2.54cm" svg:y="1.27cm">
          <draw:text-box>
            <text:p text:style-name="P4"><text:span text:style-name="T3">Pitch → Feather</text:span></text:p>
          </draw:text-box>
        </draw:frame>
        <draw:frame draw:style-name="gr8" draw:text-style-name="P6" draw:layer="layout" svg:width="4.128cm" svg:height="2.759cm" svg:x="3.174cm" svg:y="6.766cm">
          <draw:text-box>
            <text:p text:style-name="P4"><text:span text:style-name="T1">RPM &lt;= 200</text:span></text:p>
            <text:p text:style-name="P4"><text:span text:style-name="T7">Pitch → Cut in</text:span></text:p>
            <text:p text:style-name="P3"><text:span text:style-name="T3">Load → Max</text:span></text:p>
          </draw:text-box>
        </draw:frame>
        <draw:connector draw:style-name="gr19" draw:text-style-name="P2" draw:layer="layout" draw:type="curve" draw:line-skew="2.242cm" svg:x1="4.863cm" svg:y1="12.483cm" svg:x2="8.416cm" svg:y2="2.54cm" draw:start-shape="id4" draw:start-glue-point="11" draw:end-shape="id5" draw:end-glue-point="8" svg:d="M4863 12483c0-4372 3553 599 3553-9943" svg:viewBox="0 0 3554 9944">
          <text:p/>
        </draw:connector>
        <draw:custom-shape draw:style-name="gr9" draw:text-style-name="P8" xml:id="id2" draw:id="id2" draw:layer="layout" svg:width="2.54cm" svg:height="2.54cm" svg:x="0.317cm" svg:y="5.715cm">
          <text:p text:style-name="P7"><text:span text:style-name="T4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3.175cm" svg:height="3.175cm" svg:x="13.179cm" svg:y="5.397cm">
          <draw:text-box>
            <text:p text:style-name="P13"><text:span text:style-name="T6">Rated</text:span></text:p>
            <text:p text:style-name="P13"><text:span text:style-name="T6">Power</text:span></text:p>
            <text:p text:style-name="P13"><text:span text:style-name="T6">Ctrl.</text:span></text:p>
          </draw:text-box>
        </draw:frame>
        <draw:connector draw:style-name="gr20" draw:text-style-name="P2" draw:layer="layout" draw:type="curve" draw:line-skew="1.657cm" svg:x1="2.485cm" svg:y1="6.087cm" svg:x2="8.416cm" svg:y2="2.54cm" draw:start-shape="id2" draw:start-glue-point="11" draw:end-shape="id5" draw:end-glue-point="8" svg:d="M2485 6087c0-453 5931 1320 5931-3547" svg:viewBox="0 0 5932 3548">
          <text:p/>
        </draw:connector>
        <draw:frame draw:style-name="gr21" draw:text-style-name="P6" draw:layer="layout" svg:width="3.972cm" svg:height="1.505cm" svg:x="-0.162cm" svg:y="10.192cm">
          <draw:text-box>
            <text:p text:style-name="P4"><text:span text:style-name="T1">(RPM &gt; 200)</text:span></text:p>
            <text:p text:style-name="P4"><text:span text:style-name="T2">Pitch → Ramp </text:span></text:p>
          </draw:text-box>
        </draw:frame>
        <draw:custom-shape draw:style-name="gr9" draw:text-style-name="P8" xml:id="id4" draw:id="id4" draw:layer="layout" svg:width="2.54cm" svg:height="2.54cm" svg:x="2.695cm" svg:y="12.111cm">
          <text:p text:style-name="P7"><text:span text:style-name="T4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0.635cm" svg:y1="2.222cm" svg:x2="0.635cm" svg:y2="6.032cm">
          <text:p/>
        </draw:line>
        <draw:frame draw:style-name="gr23" draw:text-style-name="P12" draw:layer="layout" svg:width="5.397cm" svg:height="0.953cm" svg:x="5.08cm" svg:y="12.382cm">
          <draw:text-box>
            <text:p text:style-name="P4"><text:span text:style-name="T8">Voltage &gt; 10 V</text:span></text:p>
          </draw:text-box>
        </draw:frame>
        <draw:frame draw:style-name="gr24" draw:text-style-name="P16" draw:layer="layout" svg:width="5.397cm" svg:height="0.878cm" svg:x="5.08cm" svg:y="13.381cm">
          <draw:text-box>
            <text:p text:style-name="P4"><text:span text:style-name="T3">Load → Slow</text:span></text:p>
          </draw:text-box>
        </draw:frame>
        <draw:line draw:style-name="gr25" draw:text-style-name="P2" draw:layer="layout" svg:x1="2.857cm" svg:y1="1.27cm" svg:x2="6.985cm" svg:y2="1.271cm">
          <text:p/>
        </draw:line>
        <draw:connector draw:style-name="gr26" draw:text-style-name="P2" draw:layer="layout" draw:type="curve" draw:line-skew="2.098cm" svg:x1="10.849cm" svg:y1="12.483cm" svg:x2="8.416cm" svg:y2="2.54cm" draw:start-shape="id3" draw:start-glue-point="5" draw:end-shape="id5" draw:end-glue-point="8" svg:d="M10849 12483c0-4588-2433 383-2433-9943" svg:viewBox="0 0 2434 9944">
          <text:p/>
        </draw:connector>
        <draw:frame draw:style-name="gr27" draw:text-style-name="P6" draw:layer="layout" svg:width="5.08cm" svg:height="2.36cm" svg:x="5.877cm" svg:y="3.334cm">
          <draw:text-box>
            <text:p text:style-name="P4"><text:span text:style-name="T1">safetyTask</text:span></text:p>
            <text:p text:style-name="P4"><text:span text:style-name="T2"><text:s text:c="3"/>Load → Halt <text:s text:c="2"/></text:span></text:p>
            <text:p text:style-name="P4"><text:span text:style-name="T3">Pitch → Feather</text:span></text:p>
          </draw:text-box>
        </draw:frame>
        <draw:connector draw:style-name="gr28" draw:text-style-name="P2" draw:layer="layout" draw:type="curve" draw:line-skew="-0.758cm" svg:x1="7.518cm" svg:y1="2.168cm" svg:x2="1.587cm" svg:y2="5.715cm" draw:start-shape="id5" draw:start-glue-point="7" draw:end-shape="id2" draw:end-glue-point="4" svg:d="M7518 2168c0 1803-5931 30-5931 3547" svg:viewBox="0 0 5932 3548">
          <text:p/>
        </draw:connector>
        <draw:frame draw:style-name="gr29" draw:text-style-name="P6" draw:layer="layout" svg:width="4.127cm" svg:height="2.759cm" svg:x="0.317cm" svg:y="2.54cm">
          <draw:text-box>
            <text:p text:style-name="P3"><text:span text:style-name="T8">~safetyTask &amp; </text:span><text:span text:style-name="T1">RPM &lt;= 200</text:span></text:p>
            <text:p text:style-name="P4"><text:span text:style-name="T7">Pitch → Cut in</text:span></text:p>
            <text:p text:style-name="P3"><text:span text:style-name="T3"><text:s text:c="2"/>Load → Max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7:27:53.584775800</meta:creation-date>
    <meta:editing-duration>P0D</meta:editing-duration>
    <meta:editing-cycles>1</meta:editing-cycles>
    <meta:generator>LibreOffice/26.2.1.2$Windows_X86_64 LibreOffice_project/620$Build-2</meta:generator>
    <dc:title>CPWP 2026 FSM - Unified v3</dc:title>
    <dc:contributor>Noah (@BobSaidHi &lt;https://github.com/bobsaidhi&gt;)</dc:contributor>
    <dc:publisher>Cal Poly Wind Power</dc:publisher>
    <dc:subject>CPWP 2026 FSM</dc:subject>
    <meta:document-statistic meta:object-count="34"/>
  </office:meta>
</office:document-meta>
</file>