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stroke-dash="Dot" draw:fill="hatch" draw:fill-hatch-name="Black_20_0_20_Degrees" loext:fill-use-slide-background="false" draw:opacity="0%" draw:textarea-horizontal-align="justify" draw:textarea-vertical-align="middle" draw:auto-grow-height="false" fo:min-height="10.436cm" fo:min-width="8cm" loext:decorative="false"/>
    </style:style>
    <style:style style:name="gr2" style:family="graphic" style:parent-style-name="objectwithoutfill">
      <style:graphic-properties svg:stroke-width="0.051cm" svg:stroke-color="#789f90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71cm" svg:stroke-color="#789f90" draw:marker-start-width="0.306cm" draw:marker-end="" draw:marker-end-width="0.406cm" draw:fill="none" draw:textarea-vertical-align="middle" fo:padding-top="0.16cm" fo:padding-bottom="0.16cm" fo:padding-left="0.285cm" fo:padding-right="0.285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9.63cm" fo:min-width="9.38cm" loext:decorative="false"/>
    </style:style>
    <style:style style:name="gr5" style:family="graphic" style:parent-style-name="standard">
      <style:graphic-properties draw:fill="solid" draw:fill-color="#bd8b13" draw:textarea-horizontal-align="justify" draw:textarea-vertical-align="middle" draw:auto-grow-height="false" fo:min-height="1.796cm" fo:min-width="1.796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stroke-dash="Dot" draw:fill="none" draw:fill-color="#bd8b13" loext:fill-use-slide-background="false" draw:textarea-horizontal-align="justify" draw:textarea-vertical-align="middle" draw:auto-grow-height="false" fo:min-height="2.245cm" fo:min-width="2.245cm" fo:padding-top="0cm" fo:padding-bottom="0cm" fo:padding-left="0cm" fo:padding-right="0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bd8b13" draw:textarea-horizontal-align="justify" draw:textarea-vertical-align="middle" draw:auto-grow-height="false" fo:min-height="1.546cm" fo:min-width="1.29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71cm" svg:stroke-color="#154734" draw:marker-start-width="0.309cm" draw:marker-end="Arrowheads_20_10" draw:marker-end-width="0.411cm" draw:fill="none" draw:textarea-vertical-align="middle" fo:padding-top="0.16cm" fo:padding-bottom="0.16cm" fo:padding-left="0.285cm" fo:padding-right="0.285cm" loext:decorative="false"/>
    </style:style>
    <style:style style:name="gr9" style:family="graphic" style:parent-style-name="objectwithoutfill">
      <style:graphic-properties svg:stroke-width="0.051cm" svg:stroke-color="#154734" draw:marker-start-width="0.279cm" draw:marker-end="Arrowheads_20_12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71cm" svg:stroke-color="#154734" draw:marker-start-width="0.309cm" draw:marker-end="Arrowheads_20_13" draw:marker-end-width="0.411cm" draw:fill="none" draw:textarea-vertical-align="middle" fo:padding-top="0.16cm" fo:padding-bottom="0.16cm" fo:padding-left="0.285cm" fo:padding-right="0.285cm" loext:decorative="false"/>
    </style:style>
    <style:style style:name="gr11" style:family="graphic" style:parent-style-name="objectwithoutfill">
      <style:graphic-properties svg:stroke-width="0.051cm" svg:stroke-color="#789f90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71cm" svg:stroke-color="#54585a" draw:marker-start-width="0.309cm" draw:marker-end="Arrowheads_20_22" draw:marker-end-width="0.411cm" draw:fill="none" draw:textarea-vertical-align="middle" fo:padding-top="0.16cm" fo:padding-bottom="0.16cm" fo:padding-left="0.285cm" fo:padding-right="0.285cm" loext:decorative="false"/>
    </style:style>
    <style:style style:name="gr13" style:family="graphic" style:parent-style-name="objectwithoutfill">
      <style:graphic-properties svg:stroke-width="0.071cm" svg:stroke-color="#54585a" draw:marker-start-width="0.309cm" draw:marker-end="Arrowheads_20_23" draw:marker-end-width="0.411cm" draw:fill="none" draw:textarea-vertical-align="middle" fo:padding-top="0.16cm" fo:padding-bottom="0.16cm" fo:padding-left="0.285cm" fo:padding-right="0.285cm" loext:decorative="false"/>
    </style:style>
    <style:style style:name="gr14" style:family="graphic" style:parent-style-name="objectwithoutfill">
      <style:graphic-properties svg:stroke-width="0.071cm" svg:stroke-color="#54585a" draw:marker-start-width="0.309cm" draw:marker-end="Arrowheads_20_26" draw:marker-end-width="0.411cm" draw:fill="none" draw:textarea-vertical-align="middle" fo:padding-top="0.16cm" fo:padding-bottom="0.16cm" fo:padding-left="0.285cm" fo:padding-right="0.28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9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fo:min-height="1.25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509cm" draw:shadow-opacity="75%" loext:decorative="false"/>
      <style:paragraph-properties style:writing-mode="lr-tb"/>
    </style:style>
    <style:style style:name="gr19" style:family="graphic" style:parent-style-name="objectwithoutfill">
      <style:graphic-properties svg:stroke-width="0.071cm" svg:stroke-color="#54585a" draw:marker-start-width="0.306cm" draw:marker-end="Arrowheads_20_30" draw:marker-end-width="0.406cm" draw:fill="none" draw:textarea-vertical-align="middle" fo:padding-top="0.16cm" fo:padding-bottom="0.16cm" fo:padding-left="0.285cm" fo:padding-right="0.285cm" loext:decorative="false"/>
    </style:style>
    <style:style style:name="gr20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882cm" draw:shadow-opacity="75%" loext:decorative="false"/>
      <style:paragraph-properties style:writing-mode="lr-tb"/>
    </style:style>
    <style:style style:name="gr21" style:family="graphic" style:parent-style-name="objectwithoutfill">
      <style:graphic-properties svg:stroke-width="0.071cm" svg:stroke-color="#154734" draw:marker-start-width="0.306cm" draw:marker-end="Arrowheads_20_34" draw:marker-end-width="0.406cm" draw:fill="none" draw:textarea-vertical-align="middle" fo:padding-top="0.16cm" fo:padding-bottom="0.16cm" fo:padding-left="0.285cm" fo:padding-right="0.285cm" loext:decorative="false"/>
    </style:style>
    <style:style style:name="gr22" style:family="graphic" style:parent-style-name="standard">
      <style:graphic-properties draw:stroke="none" svg:stroke-color="#000000" draw:fill="solid" draw:fill-color="#ffffff" draw:opacity="75%" draw:textarea-horizontal-align="center" draw:auto-grow-height="true" draw:auto-grow-width="false" fo:min-height="1.882cm" draw:shadow-opacity="75%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11cm" draw:shadow-opacity="75%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882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fo:min-height="0.628cm" loext:decorative="false"/>
      <style:paragraph-properties style:writing-mode="lr-tb"/>
    </style:style>
    <style:style style:name="gr26" style:family="graphic" style:parent-style-name="objectwithoutfill">
      <style:graphic-properties svg:stroke-width="0.071cm" svg:stroke-color="#154734" draw:marker-start-width="0.306cm" draw:marker-end="Arrowheads_20_31" draw:marker-end-width="0.406cm" draw:fill="none" draw:textarea-vertical-align="middle" fo:padding-top="0.16cm" fo:padding-bottom="0.16cm" fo:padding-left="0.285cm" fo:padding-right="0.285cm" loext:decorative="false"/>
    </style:style>
    <style:style style:name="gr27" style:family="graphic" style:parent-style-name="objectwithoutfill">
      <style:graphic-properties svg:stroke-width="0.071cm" svg:stroke-color="#54585a" draw:marker-start-width="0.309cm" draw:marker-end="Arrowheads_20_3" draw:marker-end-width="0.411cm" draw:fill="none" draw:textarea-vertical-align="middle" fo:padding-top="0.16cm" fo:padding-bottom="0.16cm" fo:padding-left="0.285cm" fo:padding-right="0.285cm" loext:decorative="false"/>
    </style:style>
    <style:style style:name="gr2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607cm" draw:shadow-opacity="75%" loext:decorative="false"/>
      <style:paragraph-properties style:writing-mode="lr-tb"/>
    </style:style>
    <style:style style:name="gr29" style:family="graphic" style:parent-style-name="objectwithoutfill">
      <style:graphic-properties svg:stroke-width="0.071cm" svg:stroke-color="#154734" draw:marker-start-width="0.306cm" draw:marker-end="Arrowheads_20_32" draw:marker-end-width="0.406cm" draw:fill="none" draw:textarea-vertical-align="middle" fo:padding-top="0.16cm" fo:padding-bottom="0.16cm" fo:padding-left="0.285cm" fo:padding-right="0.285cm" loext:decorative="false"/>
    </style:style>
    <style:style style:name="gr30" style:family="graphic" style:parent-style-name="standard">
      <style:graphic-properties draw:stroke="none" draw:stroke-dash="Dot" svg:stroke-opacity="100%" svg:stroke-linecap="butt" draw:fill="solid" draw:fill-color="#ffffff" draw:textarea-horizontal-align="justify" draw:textarea-vertical-align="middle" draw:auto-grow-height="false" fo:min-height="8.536cm" fo:min-width="8.286cm" loext:decorative="false"/>
    </style:style>
    <style:style style:name="gr31" style:family="graphic" style:parent-style-name="standard">
      <style:graphic-properties draw:stroke="none" draw:stroke-dash="Dot" draw:fill="solid" draw:fill-color="#ffffff" loext:fill-use-slide-background="false" draw:textarea-horizontal-align="justify" draw:textarea-vertical-align="middle" draw:auto-grow-height="false" fo:min-height="1.796cm" fo:min-width="1.797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fo:min-height="1.25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34" style:family="graphic" style:parent-style-name="objectwithoutfill">
      <style:graphic-properties svg:stroke-width="0.071cm" svg:stroke-color="#154734" draw:marker-start-width="0.306cm" draw:marker-end="Arrowheads_20_33" draw:marker-end-width="0.406cm" draw:fill="none" draw:textarea-vertical-align="middle" fo:padding-top="0.16cm" fo:padding-bottom="0.16cm" fo:padding-left="0.285cm" fo:padding-right="0.285cm" loext:decorative="false"/>
    </style:style>
    <style:style style:name="gr35" style:family="graphic" style:parent-style-name="standard">
      <style:graphic-properties draw:stroke="none" svg:stroke-width="0cm" draw:fill="none" draw:textarea-vertical-align="middle" fo:min-height="2.29cm" loext:decorative="false"/>
      <style:paragraph-properties style:writing-mode="lr-tb"/>
    </style:style>
    <style:style style:name="P1" style:family="paragraph">
      <loext:graphic-properties draw:fill="hatch" draw:fill-hatch-name="Black_20_0_20_Degrees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Times New Roman" fo:font-size="18pt" fo:font-weight="bold" style:font-size-asian="18pt" style:font-size-complex="18pt"/>
    </style:style>
    <style:style style:name="P4" style:family="paragraph">
      <loext:graphic-properties draw:fill="solid" draw:fill-color="#bd8b13"/>
      <style:paragraph-properties fo:text-align="center" style:writing-mode="lr-tb"/>
      <style:text-properties style:font-name="Times New Roman" fo:font-size="18pt" fo:font-weight="bold" style:font-size-asian="18pt" style:font-size-complex="18pt"/>
    </style:style>
    <style:style style:name="P5" style:family="paragraph">
      <style:paragraph-properties fo:text-align="center"/>
      <style:text-properties style:font-name="Times New Roman" fo:font-size="16pt" fo:font-weight="bold" style:font-size-asian="16pt" style:font-size-complex="16pt"/>
    </style:style>
    <style:style style:name="P6" style:family="paragraph">
      <loext:graphic-properties draw:fill="none" draw:fill-color="#bd8b13"/>
      <style:paragraph-properties fo:text-align="center" style:writing-mode="lr-tb"/>
      <style:text-properties style:font-name="Times New Roman" fo:font-size="16pt" fo:font-weight="bold" style:font-size-asian="16pt" style:font-size-complex="16pt"/>
    </style:style>
    <style:style style:name="P7" style:family="paragraph">
      <loext:graphic-properties draw:fill="solid" draw:fill-color="#bd8b13"/>
      <style:paragraph-properties fo:text-align="center" style:writing-mode="lr-tb"/>
      <style:text-properties style:font-name="Times New Roman" fo:font-size="16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imes New Roman1" fo:font-size="16pt" style:text-underline-style="none" style:font-size-asian="16pt" style:font-size-complex="16pt" style:text-overline-style="none" style:text-overline-color="font-color"/>
    </style:style>
    <style:style style:name="P10" style:family="paragraph">
      <style:paragraph-properties fo:text-align="center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style:font-name="Times New Roman1" fo:font-weight="bold" style:font-weight-asian="bold" style:font-weight-complex="bold" style:text-overline-style="none" style:text-overline-color="font-color"/>
    </style:style>
    <style:style style:name="P12" style:family="paragraph">
      <loext:graphic-properties draw:fill="solid" draw:fill-color="#ffffff" draw:opacity="75%"/>
      <style:paragraph-properties fo:text-align="center"/>
      <style:text-properties style:font-name="Times New Roman1" fo:font-size="16pt" style:font-size-asian="16pt" style:font-size-complex="16pt" style:text-overline-style="solid" style:text-overline-width="auto" style:text-overline-color="font-color"/>
    </style:style>
    <style:style style:name="P13" style:family="paragraph">
      <loext:graphic-properties draw:fill="solid" draw:fill-color="#ffffff" draw:opacity="75%"/>
      <style:paragraph-properties fo:text-align="center"/>
      <style:text-properties style:font-name="Times New Roman1" style:text-overline-style="solid" style:text-overline-width="auto" style:text-overline-color="font-colo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Times New Roman" fo:font-size="16pt" fo:font-weight="bold" style:font-size-asian="16pt" style:font-size-complex="16pt"/>
    </style:style>
    <style:style style:name="P16" style:family="paragraph">
      <style:paragraph-properties fo:text-align="left"/>
    </style:style>
    <style:style style:name="P17" style:family="paragraph">
      <loext:graphic-properties draw:fill="none"/>
      <style:paragraph-properties fo:text-align="left"/>
    </style:style>
    <style:style style:name="P1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style:font-name="Times New Roman" fo:font-size="18pt" fo:font-weight="bold" style:font-size-asian="18pt" style:font-size-complex="18pt"/>
    </style:style>
    <style:style style:name="T2" style:family="text">
      <style:text-properties style:font-name="Times New Roman" fo:font-size="16pt" fo:font-weight="bold" style:font-size-asian="16pt" style:font-size-complex="16pt"/>
    </style:style>
    <style:style style:name="T3" style:family="text">
      <style:text-properties style:font-name="Times New Roman1" fo:font-size="16pt" style:text-underline-style="none" style:font-size-asian="16pt" style:font-size-complex="16pt" style:text-overline-style="none" style:text-overline-color="font-color"/>
    </style:style>
    <style:style style:name="T4" style:family="text">
      <style:text-properties fo:color="#ffffff" loext:opacity="100%" style:font-name="Times New Roman1" fo:font-weight="bold" style:font-weight-asian="bold" style:font-weight-complex="bold" style:text-overline-style="none" style:text-overline-color="font-color"/>
    </style:style>
    <style:style style:name="T5" style:family="text">
      <style:text-properties style:font-name="Times New Roman1" fo:font-size="16pt" style:font-size-asian="16pt" style:font-size-complex="16pt" style:text-overline-style="none" style:text-overline-color="font-color"/>
    </style:style>
    <style:style style:name="T6" style:family="text">
      <style:text-properties style:font-name="Times New Roman1" fo:font-size="16pt" style:text-underline-style="none" style:font-size-asian="16pt" style:font-size-complex="16pt" style:text-overline-style="solid" style:text-overline-width="auto" style:text-overline-color="font-color"/>
    </style:style>
    <style:style style:name="T7" style:family="text">
      <style:text-properties style:font-name="Times New Roman1" fo:font-size="16pt" style:font-size-asian="16pt" style:font-size-complex="16pt" style:text-overline-style="solid" style:text-overline-width="bold" style:text-overline-color="font-color"/>
    </style:style>
    <style:style style:name="T8" style:family="text">
      <style:text-properties style:font-name="Times New Roman1" style:text-underline-style="none" style:text-overline-style="none" style:text-overline-color="font-color"/>
    </style:style>
    <style:style style:name="T9" style:family="text">
      <style:text-properties style:font-name="Times New Roman1" style:text-overline-style="solid" style:text-overline-width="bold" style:text-overline-color="font-color"/>
    </style:style>
    <style:style style:name="T10" style:family="text">
      <style:text-properties style:font-name="Times New Roman1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7.883cm" svg:x2="2.485cm" svg:y2="7.883cm" draw:start-shape="id1" draw:start-glue-point="7" draw:end-shape="id2" draw:end-glue-point="9" svg:d="M14342 7883h-11857" svg:viewBox="0 0 11858 1">
          <text:p/>
        </draw:connector>
        <draw:line draw:style-name="gr3" draw:text-style-name="P2" draw:layer="layout" svg:x1="4.127cm" svg:y1="13.9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2.54cm" svg:height="2.54cm" svg:x="11.112cm" svg:y="13.97cm">
          <text:p text:style-name="P3"><text:span text:style-name="T1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175cm" svg:height="3.175cm" svg:x="0cm" svg:y="-0.317cm">
          <text:p text:style-name="P5"><text:span text:style-name="T2">Software Init. (Star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5" draw:id="id5" draw:layer="layout" svg:width="2.54cm" svg:height="2.54cm" svg:x="7.62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54cm" svg:height="2.54cm" svg:x="0.317cm" svg:y="5.715cm">
          <text:p text:style-name="P3"><text:span text:style-name="T1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2.54cm" svg:height="2.54cm" svg:x="2.857cm" svg:y="13.97cm">
          <text:p text:style-name="P3"><text:span text:style-name="T1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" draw:id="id1" draw:layer="layout" svg:width="2.54cm" svg:height="2.54cm" svg:x="13.9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0.689cm" svg:y1="7.883cm" svg:x2="2.857cm" svg:y2="15.24cm" draw:start-shape="id2" draw:start-glue-point="7" draw:end-shape="id3" draw:end-glue-point="6" svg:d="M689 7883c0 4905 722 7357 2168 7357" svg:viewBox="0 0 2169 7358">
          <text:p/>
        </draw:connector>
        <draw:connector draw:style-name="gr9" draw:text-style-name="P2" draw:layer="layout" draw:type="curve" svg:x1="5.397cm" svg:y1="15.24cm" svg:x2="11.112cm" svg:y2="15.24cm" draw:start-shape="id3" draw:start-glue-point="10" draw:end-shape="id4" svg:d="M5397 15240h5715" svg:viewBox="0 0 5716 1">
          <text:p/>
        </draw:connector>
        <draw:connector draw:style-name="gr10" draw:text-style-name="P2" draw:layer="layout" draw:type="curve" svg:x1="13.652cm" svg:y1="15.24cm" svg:x2="16.138cm" svg:y2="7.883cm" draw:start-shape="id4" draw:start-glue-point="10" draw:end-shape="id1" draw:end-glue-point="9" svg:d="M13652 15240c1658 0 2486-2452 2486-7357" svg:viewBox="0 0 2487 7358">
          <text:p/>
        </draw:connector>
        <draw:connector draw:style-name="gr11" draw:text-style-name="P2" draw:layer="layout" draw:type="curve" draw:line-skew="2.884cm" svg:x1="11.484cm" svg:y1="14.342cm" svg:x2="2.485cm" svg:y2="7.883cm" draw:start-shape="id4" draw:start-glue-point="5" draw:end-shape="id2" draw:end-glue-point="9" svg:d="M11484 14342c-2422 0 2077-6459-8999-6459" svg:viewBox="0 0 9000 6460">
          <text:p/>
        </draw:connector>
        <draw:connector draw:style-name="gr12" draw:text-style-name="P2" draw:layer="layout" draw:type="curve" draw:line-skew="1.521cm" svg:x1="5.025cm" svg:y1="14.342cm" svg:x2="8.89cm" svg:y2="2.54cm" draw:start-shape="id3" draw:start-glue-point="11" draw:end-shape="id5" draw:end-glue-point="8" svg:d="M5025 14342c0-6847 3865-947 3865-11802" svg:viewBox="0 0 3866 11803">
          <text:p/>
        </draw:connector>
        <draw:connector draw:style-name="gr13" draw:text-style-name="P2" draw:layer="layout" draw:type="curve" draw:line-skew="1.409cm" svg:x1="12.382cm" svg:y1="13.97cm" svg:x2="8.89cm" svg:y2="2.54cm" draw:start-shape="id4" draw:start-glue-point="4" draw:end-shape="id5" draw:end-glue-point="8" svg:d="M12382 13970c0-6457-3492-743-3492-11430" svg:viewBox="0 0 3493 11431">
          <text:p/>
        </draw:connector>
        <draw:connector draw:style-name="gr14" draw:text-style-name="P2" draw:layer="layout" draw:type="curve" svg:x1="13.97cm" svg:y1="6.985cm" svg:x2="8.89cm" svg:y2="2.54cm" draw:start-shape="id1" draw:start-glue-point="6" draw:end-shape="id5" draw:end-glue-point="8" svg:d="M13970 6985c-3387 0-5080-1481-5080-4445" svg:viewBox="0 0 5081 4446">
          <text:p/>
        </draw:connector>
        <draw:frame draw:style-name="gr15" draw:text-style-name="P9" draw:layer="layout" svg:width="4.128cm" svg:height="0.953cm" svg:x="2.857cm" svg:y="0.317cm">
          <draw:text-box>
            <text:p text:style-name="P8"><text:span text:style-name="T3">Safety Task</text:span></text:p>
          </draw:text-box>
        </draw:frame>
        <draw:frame draw:style-name="gr16" draw:text-style-name="P11" draw:layer="layout" svg:width="3.175cm" svg:height="3.175cm" svg:x="7.302cm" svg:y="-0.317cm">
          <draw:text-box>
            <text:p text:style-name="P10"><text:span text:style-name="T4">ESTOP</text:span></text:p>
          </draw:text-box>
        </draw:frame>
        <draw:frame draw:style-name="gr17" draw:text-style-name="P2" draw:layer="layout" svg:width="4.762cm" svg:height="1.505cm" svg:x="2.54cm" svg:y="1.27cm">
          <draw:text-box>
            <text:p text:style-name="P8"><text:span text:style-name="T5">Load → Off</text:span></text:p>
            <text:p text:style-name="P8"><text:span text:style-name="T5">Pitch → Feather</text:span></text:p>
          </draw:text-box>
        </draw:frame>
        <draw:frame draw:style-name="gr18" draw:text-style-name="P12" draw:layer="layout" svg:width="3.81cm" svg:height="2.759cm" svg:x="2.54cm" svg:y="6.448cm">
          <draw:text-box>
            <text:p text:style-name="P8"><text:span text:style-name="T6">safetyTask &amp;</text:span></text:p>
            <text:p text:style-name="P8"><text:span text:style-name="T6">(Power &gt; 0)</text:span></text:p>
            <text:p text:style-name="P8"><text:span text:style-name="T7">Load → Off <text:s/></text:span></text:p>
            <text:p text:style-name="P8"><text:span text:style-name="T5">Pitch → Fine</text:span></text:p>
          </draw:text-box>
        </draw:frame>
        <draw:frame draw:style-name="gr16" draw:text-style-name="P11" draw:layer="layout" svg:width="3.175cm" svg:height="3.175cm" svg:x="13.652cm" svg:y="5.397cm">
          <draw:text-box>
            <text:p text:style-name="P10"><text:span text:style-name="T4">Rated</text:span></text:p>
            <text:p text:style-name="P10"><text:span text:style-name="T4">Power</text:span></text:p>
            <text:p text:style-name="P10"><text:span text:style-name="T4">Ctrl.</text:span></text:p>
          </draw:text-box>
        </draw:frame>
        <draw:connector draw:style-name="gr19" draw:text-style-name="P2" draw:layer="layout" draw:type="curve" draw:line-skew="1.657cm" svg:x1="2.485cm" svg:y1="6.087cm" svg:x2="8.89cm" svg:y2="2.54cm" draw:start-shape="id2" draw:start-glue-point="11" draw:end-shape="id5" draw:end-glue-point="8" svg:d="M2485 6087c0-453 6405 1320 6405-3547" svg:viewBox="0 0 6406 3548">
          <text:p/>
        </draw:connector>
        <draw:frame draw:style-name="gr20" draw:text-style-name="P12" draw:layer="layout" svg:width="3.81cm" svg:height="2.132cm" svg:x="0cm" svg:y="11.747cm">
          <draw:text-box>
            <text:p text:style-name="P8"><text:span text:style-name="T6">SafetyTask</text:span><text:span text:style-name="T3"> &amp; (power &gt; 0)</text:span></text:p>
            <text:p text:style-name="P8"><text:span text:style-name="T7">Pitch → Fine </text:span></text:p>
          </draw:text-box>
        </draw:frame>
        <draw:line draw:style-name="gr21" draw:text-style-name="P2" draw:layer="layout" svg:x1="0.635cm" svg:y1="2.222cm" svg:x2="0.635cm" svg:y2="6.032cm">
          <text:p/>
        </draw:line>
        <draw:frame draw:style-name="gr22" draw:text-style-name="P12" draw:layer="layout" svg:width="4.127cm" svg:height="2.132cm" svg:x="-0.198cm" svg:y="2.578cm">
          <draw:text-box>
            <text:p text:style-name="P8"><text:span text:style-name="T6">safetyTask</text:span></text:p>
            <text:p text:style-name="P8"><text:span text:style-name="T7">Load → Off <text:s text:c="3"/></text:span></text:p>
            <text:p text:style-name="P8"><text:span text:style-name="T5">Pitch → Cut in</text:span></text:p>
          </draw:text-box>
        </draw:frame>
        <draw:frame draw:style-name="gr23" draw:text-style-name="P13" draw:layer="layout" svg:width="5.08cm" svg:height="2.36cm" svg:x="6.35cm" svg:y="3.334cm">
          <draw:text-box>
            <text:p text:style-name="P8"><text:span text:style-name="T8">safetyTask</text:span></text:p>
            <text:p text:style-name="P8"><text:span text:style-name="T9">Load → Off <text:s text:c="6"/></text:span></text:p>
            <text:p text:style-name="P8"><text:span text:style-name="T10">Pitch → Feather</text:span></text:p>
          </draw:text-box>
        </draw:frame>
        <draw:frame draw:style-name="gr24" draw:text-style-name="P9" draw:layer="layout" svg:width="6.35cm" svg:height="2.132cm" svg:x="5.08cm" svg:y="13.108cm">
          <draw:text-box>
            <text:p text:style-name="P8"><text:span text:style-name="T11">SafetyTask</text:span><text:span text:style-name="T12"> &amp;</text:span></text:p>
            <text:p text:style-name="P8"><text:span text:style-name="T12">(power &gt; 0) &amp; steadyRPM</text:span></text:p>
          </draw:text-box>
        </draw:frame>
        <draw:frame draw:style-name="gr25" draw:text-style-name="P2" draw:layer="layout" svg:width="5.715cm" svg:height="0.878cm" svg:x="5.397cm" svg:y="15.24cm">
          <draw:text-box>
            <text:p text:style-name="P8"><text:span text:style-name="T5">Load → On</text:span></text:p>
          </draw:text-box>
        </draw:frame>
        <draw:connector draw:style-name="gr26" draw:text-style-name="P2" draw:layer="layout" draw:type="curve" draw:line-skew="-1.018cm" svg:x1="15.24cm" svg:y1="8.255cm" svg:x2="13.28cm" svg:y2="14.342cm" draw:start-shape="id1" draw:start-glue-point="8" draw:end-shape="id4" draw:end-glue-point="11" svg:d="M15240 8255c0 2760-1960-283-1960 6087" svg:viewBox="0 0 1961 6088">
          <text:p/>
        </draw:connector>
        <draw:line draw:style-name="gr27" draw:text-style-name="P2" draw:layer="layout" svg:x1="2.857cm" svg:y1="1.27cm" svg:x2="6.985cm" svg:y2="1.271cm">
          <text:p/>
        </draw:line>
        <draw:frame draw:style-name="gr18" draw:text-style-name="P12" draw:layer="layout" svg:width="3.493cm" svg:height="2.759cm" svg:x="12.382cm" svg:y="8.353cm">
          <draw:text-box>
            <text:p text:style-name="P8"><text:span text:style-name="T6">safetyTask</text:span><text:span text:style-name="T3"> &amp;</text:span></text:p>
            <text:p text:style-name="P8"><text:span text:style-name="T3">(RPM Good)</text:span></text:p>
            <text:p text:style-name="P8"><text:span text:style-name="T7">Load → Off <text:s/></text:span></text:p>
            <text:p text:style-name="P8"><text:span text:style-name="T5">Pitch → PI</text:span></text:p>
          </draw:text-box>
        </draw:frame>
        <draw:frame draw:style-name="gr28" draw:text-style-name="P12" draw:layer="layout" svg:width="3.175cm" svg:height="2.857cm" svg:x="13.652cm" svg:y="12.065cm">
          <draw:text-box>
            <text:p text:style-name="P8"><text:span text:style-name="T6">SafetyTask</text:span></text:p>
            <text:p text:style-name="P8"><text:span text:style-name="T3">&amp; (RPM</text:span></text:p>
            <text:p text:style-name="P8"><text:span text:style-name="T3">too high)</text:span></text:p>
            <text:p text:style-name="P8"><text:span text:style-name="T7">Pitch → PI</text:span></text:p>
          </draw:text-box>
        </draw:frame>
        <draw:connector draw:style-name="gr29" draw:text-style-name="P2" draw:layer="layout" draw:type="curve" draw:line-skew="0.236cm" svg:x1="7.992cm" svg:y1="2.168cm" svg:x2="1.587cm" svg:y2="5.715cm" draw:start-shape="id5" draw:start-glue-point="7" draw:end-shape="id2" draw:end-glue-point="4" svg:d="M7992 2168c0 3294-6405 1521-6405 3547" svg:viewBox="0 0 6406 3548">
          <text:p/>
        </draw:connector>
      </draw:page>
      <draw:page draw:name="page2" draw:style-name="dp1" draw:master-page-name="Default">
        <draw:custom-shape draw:style-name="gr30" draw:text-style-name="P14" draw:layer="layout" svg:width="13.97cm" svg:height="13.97cm" svg:x="1.27cm" svg:y="1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9.153cm" svg:x2="2.168cm" svg:y2="9.153cm" draw:start-shape="id6" draw:start-glue-point="7" draw:end-shape="id7" draw:end-glue-point="9" svg:d="M14342 9153h-12174" svg:viewBox="0 0 12175 1">
          <text:p/>
        </draw:connector>
        <draw:line draw:style-name="gr3" draw:text-style-name="P2" draw:layer="layout" svg:x1="4.127cm" svg:y1="14.28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2.54cm" svg:height="2.54cm" svg:x="10.477cm" svg:y="13.97cm">
          <text:p text:style-name="P3"><text:span text:style-name="T1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2" draw:id="id12" draw:layer="layout" svg:width="2.541cm" svg:height="2.54cm" svg:x="3.491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0" draw:id="id10" draw:layer="layout" svg:width="2.54cm" svg:height="2.54cm" svg:x="10.477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2.54cm" svg:height="2.54cm" svg:x="0cm" svg:y="6.985cm">
          <text:p text:style-name="P3"><text:span text:style-name="T1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2.54cm" svg:height="2.54cm" svg:x="3.492cm" svg:y="13.97cm">
          <text:p text:style-name="P3"><text:span text:style-name="T1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2.54cm" svg:height="2.54cm" svg:x="13.9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0.372cm" svg:y1="9.153cm" svg:x2="3.492cm" svg:y2="15.24cm" draw:start-shape="id7" draw:start-glue-point="7" draw:end-shape="id8" draw:end-glue-point="6" svg:d="M372 9153c0 4058 1040 6087 3120 6087" svg:viewBox="0 0 3121 6088">
          <text:p/>
        </draw:connector>
        <draw:connector draw:style-name="gr9" draw:text-style-name="P2" draw:layer="layout" draw:type="curve" svg:x1="6.032cm" svg:y1="15.24cm" svg:x2="10.477cm" svg:y2="15.24cm" draw:start-shape="id8" draw:start-glue-point="10" draw:end-shape="id9" svg:d="M6032 15240h4445" svg:viewBox="0 0 4446 1">
          <text:p/>
        </draw:connector>
        <draw:connector draw:style-name="gr10" draw:text-style-name="P2" draw:layer="layout" draw:type="curve" svg:x1="13.017cm" svg:y1="15.24cm" svg:x2="16.138cm" svg:y2="9.153cm" draw:start-shape="id9" draw:start-glue-point="10" draw:end-shape="id6" draw:end-glue-point="9" svg:d="M13017 15240c2081 0 3121-2029 3121-6087" svg:viewBox="0 0 3122 6088">
          <text:p/>
        </draw:connector>
        <draw:connector draw:style-name="gr11" draw:text-style-name="P2" draw:layer="layout" draw:type="curve" draw:line-skew="3.333cm" svg:x1="10.849cm" svg:y1="14.342cm" svg:x2="2.168cm" svg:y2="9.153cm" draw:start-shape="id9" draw:start-glue-point="5" draw:end-shape="id7" draw:end-glue-point="9" svg:d="M10849 14342c-1510 0 2830-5189-8681-5189" svg:viewBox="0 0 8682 5190">
          <text:p/>
        </draw:connector>
        <draw:connector draw:style-name="gr12" draw:text-style-name="P2" draw:layer="layout" draw:type="curve" draw:line-skew="1.521cm" svg:x1="5.66cm" svg:y1="14.342cm" svg:x2="11.747cm" svg:y2="2.54cm" draw:start-shape="id8" draw:start-glue-point="11" draw:end-shape="id10" draw:end-glue-point="8" svg:d="M5660 14342c0-6847 6087-947 6087-11802" svg:viewBox="0 0 6088 11803">
          <text:p/>
        </draw:connector>
        <draw:connector draw:style-name="gr13" draw:text-style-name="P2" draw:layer="layout" draw:type="curve" svg:x1="11.747cm" svg:y1="13.97cm" svg:x2="11.747cm" svg:y2="2.54cm" draw:start-shape="id9" draw:start-glue-point="4" draw:end-shape="id10" draw:end-glue-point="8" svg:d="M11747 13970v-11430" svg:viewBox="0 0 1 11431">
          <text:p/>
        </draw:connector>
        <draw:connector draw:style-name="gr14" draw:text-style-name="P2" draw:layer="layout" draw:type="curve" svg:x1="13.97cm" svg:y1="8.255cm" svg:x2="11.747cm" svg:y2="2.54cm" draw:start-shape="id11" draw:start-glue-point="3" draw:end-shape="id10" draw:end-glue-point="8" svg:d="M13970 8255c-1482 0-2223-1905-2223-5715" svg:viewBox="0 0 2224 5716">
          <text:p/>
        </draw:connector>
        <draw:frame draw:style-name="gr15" draw:text-style-name="P9" draw:layer="layout" svg:width="4.445cm" svg:height="0.953cm" svg:x="6.032cm" svg:y="0.317cm">
          <draw:text-box>
            <text:p text:style-name="P8"><text:span text:style-name="T3">safety Task</text:span></text:p>
          </draw:text-box>
        </draw:frame>
        <draw:frame draw:style-name="gr16" draw:text-style-name="P11" draw:layer="layout" svg:width="3.175cm" svg:height="3.175cm" svg:x="10.16cm" svg:y="-0.317cm">
          <draw:text-box>
            <text:p text:style-name="P10"><text:span text:style-name="T4">ESTOP</text:span></text:p>
          </draw:text-box>
        </draw:frame>
        <draw:frame draw:style-name="gr32" draw:text-style-name="P17" draw:layer="layout" svg:width="4.445cm" svg:height="1.505cm" svg:x="6.032cm" svg:y="1.271cm">
          <draw:text-box>
            <text:p text:style-name="P16"><text:span text:style-name="T5">Load → Off</text:span></text:p>
            <text:p text:style-name="P16"><text:span text:style-name="T5">Pitch → Feather</text:span></text:p>
          </draw:text-box>
        </draw:frame>
        <draw:frame draw:style-name="gr18" draw:text-style-name="P12" draw:layer="layout" svg:width="3.81cm" svg:height="2.759cm" svg:x="2.54cm" svg:y="7.718cm">
          <draw:text-box>
            <text:p text:style-name="P8"><text:span text:style-name="T6">safetyTask</text:span><text:span text:style-name="T3"> &amp;</text:span></text:p>
            <text:p text:style-name="P8"><text:span text:style-name="T3">(power &lt; 0)</text:span></text:p>
            <text:p text:style-name="P8"><text:span text:style-name="T7">Load → Off <text:s/></text:span></text:p>
            <text:p text:style-name="P8"><text:span text:style-name="T5">Pitch → Fine</text:span></text:p>
          </draw:text-box>
        </draw:frame>
        <draw:frame draw:style-name="gr33" draw:text-style-name="P11" xml:id="id11" draw:id="id11" draw:layer="layout" svg:width="2.54cm" svg:height="2.54cm" svg:x="13.97cm" svg:y="6.985cm">
          <draw:text-box>
            <text:p text:style-name="P10"><text:span text:style-name="T4">Rated</text:span></text:p>
            <text:p text:style-name="P10"><text:span text:style-name="T4">Power</text:span></text:p>
            <text:p text:style-name="P10"><text:span text:style-name="T4">Ctrl.</text:span></text:p>
          </draw:text-box>
        </draw:frame>
        <draw:connector draw:style-name="gr19" draw:text-style-name="P2" draw:layer="layout" draw:type="curve" draw:line-skew="1.657cm" svg:x1="2.168cm" svg:y1="7.357cm" svg:x2="11.747cm" svg:y2="2.54cm" draw:start-shape="id7" draw:start-glue-point="11" draw:end-shape="id10" draw:end-glue-point="8" svg:d="M2168 7357c0-1405 9579 1003 9579-4817" svg:viewBox="0 0 9580 4818">
          <text:p/>
        </draw:connector>
        <draw:frame draw:style-name="gr20" draw:text-style-name="P12" draw:layer="layout" svg:width="3.81cm" svg:height="2.132cm" svg:x="0cm" svg:y="11.747cm">
          <draw:text-box>
            <text:p text:style-name="P8"><text:span text:style-name="T6">safetyTask</text:span><text:span text:style-name="T3"> &amp; (power &gt; 0)</text:span></text:p>
            <text:p text:style-name="P8"><text:span text:style-name="T7">Pitch → Fine </text:span></text:p>
          </draw:text-box>
        </draw:frame>
        <draw:frame draw:style-name="gr20" draw:text-style-name="P12" draw:layer="layout" svg:width="4.445cm" svg:height="2.132cm" svg:x="9.525cm" svg:y="3.31cm">
          <draw:text-box>
            <text:p text:style-name="P8"><text:span text:style-name="T3">safetyTask</text:span></text:p>
            <text:p text:style-name="P8"><text:span text:style-name="T7">Load → Off <text:s text:c="6"/></text:span></text:p>
            <text:p text:style-name="P8"><text:span text:style-name="T5">Pitch → Feather</text:span></text:p>
          </draw:text-box>
        </draw:frame>
        <draw:connector draw:style-name="gr29" draw:text-style-name="P2" draw:layer="layout" draw:type="curve" draw:line-skew="-0.742cm" svg:x1="10.849cm" svg:y1="2.168cm" svg:x2="1.27cm" svg:y2="6.985cm" draw:start-shape="id10" draw:start-glue-point="7" draw:end-shape="id7" draw:end-glue-point="4" svg:d="M10849 2168c0 2779-9579 371-9579 4817" svg:viewBox="0 0 9580 4818">
          <text:p/>
        </draw:connector>
        <draw:frame draw:style-name="gr24" draw:text-style-name="P9" draw:layer="layout" svg:width="5.08cm" svg:height="2.132cm" svg:x="5.715cm" svg:y="13.108cm">
          <draw:text-box>
            <text:p text:style-name="P8"><text:span text:style-name="T11">safetyTask</text:span><text:span text:style-name="T12"> &amp;</text:span></text:p>
            <text:p text:style-name="P8"><text:span text:style-name="T12">(power &gt; 0) &amp; steadyRPM</text:span></text:p>
          </draw:text-box>
        </draw:frame>
        <draw:frame draw:style-name="gr25" draw:text-style-name="P2" draw:layer="layout" svg:width="5.08cm" svg:height="0.878cm" svg:x="5.715cm" svg:y="15.24cm">
          <draw:text-box>
            <text:p text:style-name="P8"><text:span text:style-name="T5">Load → On</text:span></text:p>
          </draw:text-box>
        </draw:frame>
        <draw:connector draw:style-name="gr26" draw:text-style-name="P2" draw:layer="layout" draw:type="curve" draw:line-skew="-1.018cm" svg:x1="15.24cm" svg:y1="9.525cm" svg:x2="12.645cm" svg:y2="14.342cm" draw:start-shape="id6" draw:start-glue-point="8" draw:end-shape="id9" draw:end-glue-point="11" svg:d="M15240 9525c0 1807-2595-601-2595 4817" svg:viewBox="0 0 2596 4818">
          <text:p/>
        </draw:connector>
        <draw:line draw:style-name="gr27" draw:text-style-name="P2" draw:layer="layout" svg:x1="6.032cm" svg:y1="1.27cm" svg:x2="10.478cm" svg:y2="1.271cm">
          <text:p/>
        </draw:line>
        <draw:frame draw:style-name="gr20" draw:text-style-name="P12" draw:layer="layout" svg:width="3.493cm" svg:height="2.132cm" svg:x="12.065cm" svg:y="9.842cm">
          <draw:text-box>
            <text:p text:style-name="P8"><text:span text:style-name="T6">safetyTask</text:span><text:span text:style-name="T3"> &amp;</text:span></text:p>
            <text:p text:style-name="P8"><text:span text:style-name="T3">(RPM OK)</text:span></text:p>
            <text:p text:style-name="P8"><text:span text:style-name="T7"><text:s text:c="2"/>Pitch → PI <text:s/></text:span></text:p>
          </draw:text-box>
        </draw:frame>
        <draw:frame draw:style-name="gr18" draw:text-style-name="P12" draw:layer="layout" svg:width="3.175cm" svg:height="2.759cm" svg:x="13.335cm" svg:y="13.225cm">
          <draw:text-box>
            <text:p text:style-name="P8"><text:span text:style-name="T6">safetyTask</text:span></text:p>
            <text:p text:style-name="P8"><text:span text:style-name="T3">&amp; (RPM</text:span></text:p>
            <text:p text:style-name="P8"><text:span text:style-name="T3">too high)</text:span></text:p>
            <text:p text:style-name="P8"><text:span text:style-name="T7">Pitch → PI</text:span></text:p>
          </draw:text-box>
        </draw:frame>
        <draw:connector draw:style-name="gr34" draw:text-style-name="P2" draw:layer="layout" draw:type="curve" svg:x1="3.491cm" svg:y1="1.27cm" svg:x2="1.27cm" svg:y2="6.985cm" draw:start-shape="id12" draw:start-glue-point="6" draw:end-shape="id7" draw:end-glue-point="4" svg:d="M3491 1270c-1481 0-2221 1905-2221 5715" svg:viewBox="0 0 2222 5716">
          <text:p/>
        </draw:connector>
        <draw:frame draw:style-name="gr22" draw:text-style-name="P12" draw:layer="layout" svg:width="4.127cm" svg:height="2.132cm" svg:x="0cm" svg:y="4.218cm">
          <draw:text-box>
            <text:p text:style-name="P8"><text:span text:style-name="T6">safetyTask</text:span></text:p>
            <text:p text:style-name="P8"><text:span text:style-name="T7">Load → Off <text:s text:c="3"/></text:span></text:p>
            <text:p text:style-name="P8"><text:span text:style-name="T5">Pitch → Cut in</text:span></text:p>
          </draw:text-box>
        </draw:frame>
        <draw:frame draw:style-name="gr35" draw:text-style-name="P18" draw:layer="layout" svg:width="2.54cm" svg:height="2.54cm" svg:x="3.492cm" svg:y="0cm">
          <draw:text-box>
            <text:p text:style-name="P8"><text:span text:style-name="T13">Software Init. (Start)</text:span></text:p>
          </draw:text-box>
        </draw:frame>
      </draw:page>
      <draw:page draw:name="page3" draw:style-name="dp1" draw:master-page-name="Default">
        <draw:custom-shape draw:style-name="gr30" draw:text-style-name="P14" draw:layer="layout" svg:width="13.97cm" svg:height="13.97cm" svg:x="1.27cm" svg:y="1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8.233cm" svg:x2="2.168cm" svg:y2="8.233cm" draw:start-shape="id13" draw:start-glue-point="7" draw:end-shape="id14" draw:end-glue-point="9" svg:d="M14342 8233h-12174" svg:viewBox="0 0 12175 1">
          <text:p/>
        </draw:connector>
        <draw:line draw:style-name="gr3" draw:text-style-name="P2" draw:layer="layout" svg:x1="4.127cm" svg:y1="13.367cm" svg:x2="4.127cm" svg:y2="7.33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2.54cm" svg:height="2.54cm" svg:x="10.502cm" svg:y="12.382cm">
          <text:p text:style-name="P3"><text:span text:style-name="T1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9" draw:id="id19" draw:layer="layout" svg:width="2.541cm" svg:height="2.54cm" svg:x="3.491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7" draw:id="id17" draw:layer="layout" svg:width="2.54cm" svg:height="2.54cm" svg:x="10.477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2.54cm" svg:height="2.54cm" svg:x="0cm" svg:y="6.065cm">
          <text:p text:style-name="P3"><text:span text:style-name="T1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2.54cm" svg:height="2.54cm" svg:x="3.517cm" svg:y="12.382cm">
          <text:p text:style-name="P3"><text:span text:style-name="T1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3" draw:id="id13" draw:layer="layout" svg:width="2.54cm" svg:height="2.54cm" svg:x="13.97cm" svg:y="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0.372cm" svg:y1="8.233cm" svg:x2="3.517cm" svg:y2="13.652cm" draw:start-shape="id14" draw:start-glue-point="7" draw:end-shape="id15" draw:end-glue-point="6" svg:d="M372 8233c0 3613 1048 5419 3145 5419" svg:viewBox="0 0 3146 5420">
          <text:p/>
        </draw:connector>
        <draw:connector draw:style-name="gr9" draw:text-style-name="P2" draw:layer="layout" draw:type="curve" svg:x1="6.057cm" svg:y1="13.652cm" svg:x2="10.502cm" svg:y2="13.652cm" draw:start-shape="id15" draw:start-glue-point="10" draw:end-shape="id16" svg:d="M6057 13652h4445" svg:viewBox="0 0 4446 1">
          <text:p/>
        </draw:connector>
        <draw:connector draw:style-name="gr10" draw:text-style-name="P2" draw:layer="layout" draw:type="curve" svg:x1="13.042cm" svg:y1="13.652cm" svg:x2="16.138cm" svg:y2="8.233cm" draw:start-shape="id16" draw:start-glue-point="10" draw:end-shape="id13" draw:end-glue-point="9" svg:d="M13042 13652c2064 0 3096-1806 3096-5419" svg:viewBox="0 0 3097 5420">
          <text:p/>
        </draw:connector>
        <draw:connector draw:style-name="gr11" draw:text-style-name="P2" draw:layer="layout" draw:type="curve" draw:line-skew="3.333cm" svg:x1="10.874cm" svg:y1="12.754cm" svg:x2="2.168cm" svg:y2="8.233cm" draw:start-shape="id16" draw:start-glue-point="5" draw:end-shape="id14" draw:end-glue-point="9" svg:d="M10874 12754c-1528 0 2824-4521-8706-4521" svg:viewBox="0 0 8707 4522">
          <text:p/>
        </draw:connector>
        <draw:connector draw:style-name="gr12" draw:text-style-name="P2" draw:layer="layout" draw:type="curve" draw:line-skew="1.521cm" svg:x1="5.685cm" svg:y1="12.754cm" svg:x2="11.747cm" svg:y2="2.54cm" draw:start-shape="id15" draw:start-glue-point="11" draw:end-shape="id17" draw:end-glue-point="8" svg:d="M5685 12754c0-5656 6062-550 6062-10214" svg:viewBox="0 0 6063 10215">
          <text:p/>
        </draw:connector>
        <draw:connector draw:style-name="gr13" draw:text-style-name="P2" draw:layer="layout" draw:type="curve" svg:x1="11.772cm" svg:y1="12.382cm" svg:x2="11.747cm" svg:y2="2.54cm" draw:start-shape="id16" draw:start-glue-point="4" draw:end-shape="id17" draw:end-glue-point="8" svg:d="M11772 12382c0-7380-25-2459-25-9842" svg:viewBox="0 0 26 9843">
          <text:p/>
        </draw:connector>
        <draw:connector draw:style-name="gr14" draw:text-style-name="P2" draw:layer="layout" draw:type="curve" svg:x1="13.97cm" svg:y1="7.335cm" svg:x2="11.747cm" svg:y2="2.54cm" draw:start-shape="id18" draw:start-glue-point="3" draw:end-shape="id17" draw:end-glue-point="8" svg:d="M13970 7335c-1482 0-2223-1598-2223-4795" svg:viewBox="0 0 2224 4796">
          <text:p/>
        </draw:connector>
        <draw:frame draw:style-name="gr15" draw:text-style-name="P9" draw:layer="layout" svg:width="4.445cm" svg:height="0.953cm" svg:x="6.032cm" svg:y="0.317cm">
          <draw:text-box>
            <text:p text:style-name="P8"><text:span text:style-name="T3">safety Task</text:span></text:p>
          </draw:text-box>
        </draw:frame>
        <draw:frame draw:style-name="gr16" draw:text-style-name="P11" draw:layer="layout" svg:width="3.175cm" svg:height="3.175cm" svg:x="10.16cm" svg:y="-0.317cm">
          <draw:text-box>
            <text:p text:style-name="P10"><text:span text:style-name="T4">ESTOP</text:span></text:p>
          </draw:text-box>
        </draw:frame>
        <draw:frame draw:style-name="gr32" draw:text-style-name="P17" draw:layer="layout" svg:width="4.445cm" svg:height="1.505cm" svg:x="6.032cm" svg:y="1.271cm">
          <draw:text-box>
            <text:p text:style-name="P16"><text:span text:style-name="T5">Load → Off</text:span></text:p>
            <text:p text:style-name="P16"><text:span text:style-name="T5">Pitch → Feather</text:span></text:p>
          </draw:text-box>
        </draw:frame>
        <draw:frame draw:style-name="gr18" draw:text-style-name="P12" draw:layer="layout" svg:width="3.81cm" svg:height="2.759cm" svg:x="2.54cm" svg:y="6.798cm">
          <draw:text-box>
            <text:p text:style-name="P8"><text:span text:style-name="T6">safetyTask</text:span><text:span text:style-name="T3"> &amp;</text:span></text:p>
            <text:p text:style-name="P8"><text:span text:style-name="T3">(power &lt; 0)</text:span></text:p>
            <text:p text:style-name="P8"><text:span text:style-name="T7">Load → Off <text:s/></text:span></text:p>
            <text:p text:style-name="P8"><text:span text:style-name="T5">Pitch → Fine</text:span></text:p>
          </draw:text-box>
        </draw:frame>
        <draw:frame draw:style-name="gr33" draw:text-style-name="P11" xml:id="id18" draw:id="id18" draw:layer="layout" svg:width="2.54cm" svg:height="2.54cm" svg:x="13.97cm" svg:y="6.065cm">
          <draw:text-box>
            <text:p text:style-name="P10"><text:span text:style-name="T4">Rated</text:span></text:p>
            <text:p text:style-name="P10"><text:span text:style-name="T4">Power</text:span></text:p>
            <text:p text:style-name="P10"><text:span text:style-name="T4">Ctrl.</text:span></text:p>
          </draw:text-box>
        </draw:frame>
        <draw:connector draw:style-name="gr19" draw:text-style-name="P2" draw:layer="layout" draw:type="curve" draw:line-skew="1.657cm" svg:x1="2.168cm" svg:y1="6.437cm" svg:x2="11.747cm" svg:y2="2.54cm" draw:start-shape="id14" draw:start-glue-point="11" draw:end-shape="id17" draw:end-glue-point="8" svg:d="M2168 6437c0-715 9579 1233 9579-3897" svg:viewBox="0 0 9580 3898">
          <text:p/>
        </draw:connector>
        <draw:frame draw:style-name="gr20" draw:text-style-name="P12" draw:layer="layout" svg:width="3.81cm" svg:height="2.132cm" svg:x="0cm" svg:y="10.477cm">
          <draw:text-box>
            <text:p text:style-name="P8"><text:span text:style-name="T6">safetyTask</text:span><text:span text:style-name="T3"> &amp; (power &gt; 0)</text:span></text:p>
            <text:p text:style-name="P8"><text:span text:style-name="T7">Pitch → Fine </text:span></text:p>
          </draw:text-box>
        </draw:frame>
        <draw:frame draw:style-name="gr20" draw:text-style-name="P12" draw:layer="layout" svg:width="4.445cm" svg:height="2.132cm" svg:x="9.525cm" svg:y="3.31cm">
          <draw:text-box>
            <text:p text:style-name="P8"><text:span text:style-name="T3">safetyTask</text:span></text:p>
            <text:p text:style-name="P8"><text:span text:style-name="T7">Load → Off <text:s text:c="6"/></text:span></text:p>
            <text:p text:style-name="P8"><text:span text:style-name="T5">Pitch → Feather</text:span></text:p>
          </draw:text-box>
        </draw:frame>
        <draw:connector draw:style-name="gr29" draw:text-style-name="P2" draw:layer="layout" draw:type="curve" draw:line-skew="-0.472cm" svg:x1="10.849cm" svg:y1="2.168cm" svg:x2="1.27cm" svg:y2="6.065cm" draw:start-shape="id17" draw:start-glue-point="7" draw:end-shape="id14" draw:end-glue-point="4" svg:d="M10849 2168c0 2494-9579 546-9579 3897" svg:viewBox="0 0 9580 3898">
          <text:p/>
        </draw:connector>
        <draw:frame draw:style-name="gr24" draw:text-style-name="P9" draw:layer="layout" svg:width="5.08cm" svg:height="2.132cm" svg:x="5.74cm" svg:y="11.52cm">
          <draw:text-box>
            <text:p text:style-name="P8"><text:span text:style-name="T11">safetyTask</text:span><text:span text:style-name="T12"> &amp;</text:span></text:p>
            <text:p text:style-name="P8"><text:span text:style-name="T12">(power &gt; 0) &amp; steadyRPM</text:span></text:p>
          </draw:text-box>
        </draw:frame>
        <draw:frame draw:style-name="gr25" draw:text-style-name="P2" draw:layer="layout" svg:width="5.08cm" svg:height="0.878cm" svg:x="5.74cm" svg:y="13.652cm">
          <draw:text-box>
            <text:p text:style-name="P8"><text:span text:style-name="T5">Load → On</text:span></text:p>
          </draw:text-box>
        </draw:frame>
        <draw:connector draw:style-name="gr26" draw:text-style-name="P2" draw:layer="layout" draw:type="curve" draw:line-skew="-1.018cm" svg:x1="15.24cm" svg:y1="8.605cm" svg:x2="12.67cm" svg:y2="12.754cm" draw:start-shape="id13" draw:start-glue-point="8" draw:end-shape="id16" draw:end-glue-point="11" svg:d="M15240 8605c0 1306-2570-768-2570 4149" svg:viewBox="0 0 2571 4150">
          <text:p/>
        </draw:connector>
        <draw:line draw:style-name="gr27" draw:text-style-name="P2" draw:layer="layout" svg:x1="6.032cm" svg:y1="1.27cm" svg:x2="10.478cm" svg:y2="1.271cm">
          <text:p/>
        </draw:line>
        <draw:frame draw:style-name="gr20" draw:text-style-name="P12" draw:layer="layout" svg:width="3.493cm" svg:height="2.132cm" svg:x="12.065cm" svg:y="8.922cm">
          <draw:text-box>
            <text:p text:style-name="P8"><text:span text:style-name="T6">safetyTask</text:span><text:span text:style-name="T3"> &amp;</text:span></text:p>
            <text:p text:style-name="P8"><text:span text:style-name="T3">(RPM OK)</text:span></text:p>
            <text:p text:style-name="P8"><text:span text:style-name="T7"><text:s text:c="2"/>Pitch → PI <text:s/></text:span></text:p>
          </draw:text-box>
        </draw:frame>
        <draw:frame draw:style-name="gr18" draw:text-style-name="P12" draw:layer="layout" svg:width="3.175cm" svg:height="2.759cm" svg:x="13.36cm" svg:y="11.637cm">
          <draw:text-box>
            <text:p text:style-name="P8"><text:span text:style-name="T6">safetyTask</text:span></text:p>
            <text:p text:style-name="P8"><text:span text:style-name="T3">&amp; (RPM</text:span></text:p>
            <text:p text:style-name="P8"><text:span text:style-name="T3">too high)</text:span></text:p>
            <text:p text:style-name="P8"><text:span text:style-name="T7">Pitch → PI</text:span></text:p>
          </draw:text-box>
        </draw:frame>
        <draw:connector draw:style-name="gr34" draw:text-style-name="P2" draw:layer="layout" draw:type="curve" svg:x1="3.491cm" svg:y1="1.27cm" svg:x2="1.27cm" svg:y2="6.065cm" draw:start-shape="id19" draw:start-glue-point="6" draw:end-shape="id14" draw:end-glue-point="4" svg:d="M3491 1270c-1481 0-2221 1598-2221 4795" svg:viewBox="0 0 2222 4796">
          <text:p/>
        </draw:connector>
        <draw:frame draw:style-name="gr22" draw:text-style-name="P12" draw:layer="layout" svg:width="4.127cm" svg:height="2.132cm" svg:x="0cm" svg:y="3.298cm">
          <draw:text-box>
            <text:p text:style-name="P8"><text:span text:style-name="T6">safetyTask</text:span></text:p>
            <text:p text:style-name="P8"><text:span text:style-name="T7">Load → Off <text:s text:c="3"/></text:span></text:p>
            <text:p text:style-name="P8"><text:span text:style-name="T5">Pitch → Cut in</text:span></text:p>
          </draw:text-box>
        </draw:frame>
        <draw:frame draw:style-name="gr35" draw:text-style-name="P18" draw:layer="layout" svg:width="2.54cm" svg:height="2.54cm" svg:x="3.492cm" svg:y="0cm">
          <draw:text-box>
            <text:p text:style-name="P8"><text:span text:style-name="T13">Software Init. (Star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5T17:27:53.584775800</meta:creation-date>
    <meta:editing-duration>P0D</meta:editing-duration>
    <meta:editing-cycles>1</meta:editing-cycles>
    <meta:generator>LibreOffice/26.2.1.2$Windows_X86_64 LibreOffice_project/620$Build-2</meta:generator>
    <dc:title>CPWP 2026 FSM - Unified v3</dc:title>
    <meta:document-statistic meta:object-count="106"/>
  </office:meta>
</office:document-meta>
</file>